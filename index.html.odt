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index.html</text:span><text:line-break/><text:line-break/><text:span text:style-name="T1">&lt;!DOCTYPE html&gt;</text:span><text:line-break/><text:span text:style-name="T1">&lt;html lang="de"&gt;</text:span><text:line-break/><text:span text:style-name="T1">&lt;head&gt;</text:span><text:line-break/><text:span text:style-name="T1">&lt;meta charset="UTF-8"&gt;</text:span><text:line-break/><text:span text:style-name="T1">&lt;meta name="viewport" content="width=device-width, initial-scale=1.0"&gt;</text:span><text:line-break/><text:line-break/><text:span text:style-name="T1">&lt;title&gt;Fußpflege Ana | Kosmetische Fußpflege &amp; Maniküre in München-Schwabing&lt;/title&gt;</text:span><text:line-break/><text:span text:style-name="T1">&lt;meta name="description" content="Fußpflege Ana in München-Schwabing: kosmetische Fußpflege, Maniküre, Wellness-Massagen und Klebespangen. Über 12 Jahre Erfahrung, Hygiene, Sorgfalt und Qualität."&gt;</text:span><text:line-break/><text:line-break/><text:span text:style-name="T1">&lt;link rel="stylesheet" href="style.css"&gt;</text:span><text:line-break/><text:span text:style-name="T1">&lt;/head&gt;</text:span><text:line-break/><text:line-break/><text:span text:style-name="T1">&lt;body&gt;</text:span><text:line-break/><text:line-break/><text:span text:style-name="T1">&lt;header class="header"&gt;</text:span><text:line-break/><text:span text:style-name="T1">&lt;a href="index.html" class="logo"&gt;</text:span><text:line-break/><text:span text:style-name="T1">&lt;img src="images/logo-fa.png" alt="Fußpflege Ana Logo"&gt;</text:span><text:line-break/><text:span text:style-name="T1">&lt;span&gt;Fußpflege Ana&lt;/span&gt;</text:span><text:line-break/><text:span text:style-name="T1">&lt;/a&gt;</text:span><text:line-break/><text:line-break/><text:span text:style-name="T1">&lt;nav&gt;</text:span><text:line-break/><text:span text:style-name="T1">&lt;a href="#leistungen"&gt;Leistungen&lt;/a&gt;</text:span><text:line-break/><text:span text:style-name="T1">&lt;a href="#hygiene"&gt;Hygiene&lt;/a&gt;</text:span><text:line-break/><text:span text:style-name="T1">&lt;a href="#bewertungen"&gt;Bewertungen&lt;/a&gt;</text:span><text:line-break/><text:span text:style-name="T1">&lt;a href="#buchung" class="glass-btn small"&gt;Termin buchen&lt;/a&gt;</text:span><text:line-break/><text:span text:style-name="T1">&lt;/nav&gt;</text:span><text:line-break/><text:span text:style-name="T1">&lt;/header&gt;</text:span><text:line-break/><text:line-break/><text:span text:style-name="T1">&lt;main&gt;</text:span><text:line-break/><text:line-break/><text:span text:style-name="T1">&lt;section class="hero"&gt;</text:span><text:line-break/><text:span text:style-name="T1">&lt;div class="hero-content"&gt;</text:span><text:line-break/><text:span text:style-name="T1">&lt;div class="hero-text"&gt;</text:span><text:line-break/><text:span text:style-name="T1">&lt;img src="images/logo-fa.png" alt="Fußpflege Ana Logo" class="hero-logo"&gt;</text:span><text:line-break/><text:line-break/><text:span text:style-name="T1">&lt;h1&gt;Fußpflege Ana&lt;/h1&gt;</text:span><text:line-break/><text:line-break/><text:span text:style-name="T1">&lt;p class="subtitle"&gt;</text:span><text:line-break/><text:span text:style-name="T1">Kosmetische Fußpflege, Maniküre und Wellnessanwendungen in München-Schwabing</text:span><text:line-break/><text:span text:style-name="T1">&lt;/p&gt;</text:span><text:line-break/><text:line-break/><text:span text:style-name="T1">&lt;p class="claim"&gt;</text:span><text:line-break/><text:span text:style-name="T1">Über 12 Jahre Erfahrung. Hygiene, Sorgfalt und Qualität.</text:span><text:line-break/><text:span text:style-name="T1">&lt;/p&gt;</text:span><text:line-break/><text:line-break/><text:soft-page-break/><text:span text:style-name="T1">&lt;a href="#buchung" class="glass-btn"&gt;Termin online buchen&lt;/a&gt;</text:span><text:line-break/><text:span text:style-name="T1">&lt;/div&gt;</text:span><text:line-break/><text:line-break/><text:span text:style-name="T1">&lt;div class="hero-photo"&gt;</text:span><text:line-break/><text:span text:style-name="T1">&lt;img src="images/hero-ana.jpg" alt="Frau Sidorova von Fußpflege Ana"&gt;</text:span><text:line-break/><text:span text:style-name="T1">&lt;/div&gt;</text:span><text:line-break/><text:span text:style-name="T1">&lt;/div&gt;</text:span><text:line-break/><text:span text:style-name="T1">&lt;/section&gt;</text:span><text:line-break/><text:line-break/><text:span text:style-name="T1">&lt;section class="advantages"&gt;</text:span><text:line-break/><text:span text:style-name="T1">&lt;div&gt;</text:span><text:line-break/><text:span text:style-name="T1">&lt;h3&gt;Höchste Hygienestandards&lt;/h3&gt;</text:span><text:line-break/><text:span text:style-name="T1">&lt;p&gt;Sorgfältig aufbereitete Instrumente.&lt;/p&gt;</text:span><text:line-break/><text:span text:style-name="T1">&lt;/div&gt;</text:span><text:line-break/><text:line-break/><text:span text:style-name="T1">&lt;div&gt;</text:span><text:line-break/><text:span text:style-name="T1">&lt;h3&gt;Über 12 Jahre Erfahrung&lt;/h3&gt;</text:span><text:line-break/><text:span text:style-name="T1">&lt;p&gt;Fußpflege, Maniküre und Spangentechnik.&lt;/p&gt;</text:span><text:line-break/><text:span text:style-name="T1">&lt;/div&gt;</text:span><text:line-break/><text:line-break/><text:span text:style-name="T1">&lt;div&gt;</text:span><text:line-break/><text:span text:style-name="T1">&lt;h3&gt;Zahlreiche positive Bewertungen&lt;/h3&gt;</text:span><text:line-break/><text:span text:style-name="T1">&lt;p&gt;Von vielen Kundinnen und Kunden empfohlen.&lt;/p&gt;</text:span><text:line-break/><text:span text:style-name="T1">&lt;/div&gt;</text:span><text:line-break/><text:line-break/><text:span text:style-name="T1">&lt;div&gt;</text:span><text:line-break/><text:span text:style-name="T1">&lt;h3&gt;Online-Terminbuchung&lt;/h3&gt;</text:span><text:line-break/><text:span text:style-name="T1">&lt;p&gt;Einfach und bequem online buchen.&lt;/p&gt;</text:span><text:line-break/><text:span text:style-name="T1">&lt;/div&gt;</text:span><text:line-break/><text:span text:style-name="T1">&lt;/section&gt;</text:span><text:line-break/><text:line-break/><text:span text:style-name="T1">&lt;section id="leistungen" class="section"&gt;</text:span><text:line-break/><text:span text:style-name="T1">&lt;p class="eyebrow"&gt;Leistungen&lt;/p&gt;</text:span><text:line-break/><text:span text:style-name="T1">&lt;h2&gt;Unsere Behandlungen&lt;/h2&gt;</text:span><text:line-break/><text:line-break/><text:span text:style-name="T1">&lt;div class="cards"&gt;</text:span><text:line-break/><text:span text:style-name="T1">&lt;article&gt;</text:span><text:line-break/><text:span text:style-name="T1">&lt;h3&gt;Fußpflege&lt;/h3&gt;</text:span><text:line-break/><text:span text:style-name="T1">&lt;p&gt;Professionelle kosmetische Fußpflege für gepflegte und schöne Füße.&lt;/p&gt;</text:span><text:line-break/><text:span text:style-name="T1">&lt;/article&gt;</text:span><text:line-break/><text:line-break/><text:span text:style-name="T1">&lt;article&gt;</text:span><text:line-break/><text:span text:style-name="T1">&lt;h3&gt;Maniküre&lt;/h3&gt;</text:span><text:line-break/><text:span text:style-name="T1">&lt;p&gt;Natürliche und gepflegte Hände mit Liebe zum Detail.&lt;/p&gt;</text:span><text:line-break/><text:span text:style-name="T1">&lt;/article&gt;</text:span><text:line-break/><text:line-break/><text:span text:style-name="T1">&lt;article&gt;</text:span><text:line-break/><text:span text:style-name="T1">&lt;h3&gt;Wellness-Massagen&lt;/h3&gt;</text:span><text:line-break/><text:span text:style-name="T1">&lt;p&gt;Entspannende Anwendungen für mehr Wohlbefinden.&lt;/p&gt;</text:span><text:line-break/><text:soft-page-break/><text:span text:style-name="T1">&lt;/article&gt;</text:span><text:line-break/><text:line-break/><text:span text:style-name="T1">&lt;article&gt;</text:span><text:line-break/><text:span text:style-name="T1">&lt;h3&gt;Klebespangen&lt;/h3&gt;</text:span><text:line-break/><text:span text:style-name="T1">&lt;p&gt;Schonende Korrekturmöglichkeiten für Problemnägel.&lt;/p&gt;</text:span><text:line-break/><text:span text:style-name="T1">&lt;/article&gt;</text:span><text:line-break/><text:line-break/><text:span text:style-name="T1">&lt;article&gt;</text:span><text:line-break/><text:span text:style-name="T1">&lt;h3&gt;Beratung&lt;/h3&gt;</text:span><text:line-break/><text:span text:style-name="T1">&lt;p&gt;Persönliche Analyse und individuelle Empfehlungen.&lt;/p&gt;</text:span><text:line-break/><text:span text:style-name="T1">&lt;/article&gt;</text:span><text:line-break/><text:span text:style-name="T1">&lt;/div&gt;</text:span><text:line-break/><text:span text:style-name="T1">&lt;/section&gt;</text:span><text:line-break/><text:line-break/><text:span text:style-name="T1">&lt;section id="hygiene" class="section split"&gt;</text:span><text:line-break/><text:span text:style-name="T1">&lt;div&gt;</text:span><text:line-break/><text:span text:style-name="T1">&lt;p class="eyebrow"&gt;Hygiene &amp; Sauberkeit&lt;/p&gt;</text:span><text:line-break/><text:span text:style-name="T1">&lt;h2&gt;Hygiene hat höchste Priorität&lt;/h2&gt;</text:span><text:line-break/><text:line-break/><text:span text:style-name="T1">&lt;p&gt;</text:span><text:line-break/><text:span text:style-name="T1">Alle Instrumente werden nach jeder Behandlung sorgfältig gereinigt und fachgerecht aufbereitet.</text:span><text:line-break/><text:span text:style-name="T1">Für jede Kundin und jeden Kunden werden hygienische Standards konsequent eingehalten.</text:span><text:line-break/><text:span text:style-name="T1">&lt;/p&gt;</text:span><text:line-break/><text:line-break/><text:span text:style-name="T1">&lt;p&gt;</text:span><text:line-break/><text:span text:style-name="T1">Ein sauberes Umfeld und ein sorgfältiger Umgang mit Arbeitsmaterialien sind für uns selbstverständlich.</text:span><text:line-break/><text:span text:style-name="T1">&lt;/p&gt;</text:span><text:line-break/>&lt;/div&gt;<text:line-break/><text:line-break/>&lt;div class="image-box"&gt;<text:line-break/>&lt;img src="images/hygiene.jpg" alt="Hygienisch aufbereitete Instrumente bei Fußpflege Ana"&gt;<text:line-break/>&lt;/div&gt;<text:line-break/>&lt;/section&gt;<text:line-break/><text:line-break/>&lt;section class="section"&gt;<text:line-break/>&lt;p class="eyebrow"&gt;Galerie&lt;/p&gt;<text:line-break/>&lt;h2&gt;Einblicke in unsere Arbeit&lt;/h2&gt;<text:line-break/><text:line-break/>&lt;div class="gallery"&gt;<text:line-break/>&lt;img src="images/gallery-1.jpg" alt="Maniküre bei Fußpflege Ana"&gt;<text:line-break/>&lt;img src="images/gallery-2.jpg" alt="Kosmetische Fußpflege bei Fußpflege Ana"&gt;<text:line-break/>&lt;img src="images/gallery-3.jpg" alt="Arbeitsbereich bei Fußpflege Ana"&gt;<text:line-break/>&lt;img src="images/gallery-4.jpg" alt="Atmosphäre bei Fußpflege Ana"&gt;<text:line-break/>&lt;/div&gt;<text:line-break/>&lt;/section&gt;<text:line-break/><text:line-break/>&lt;section id="bewertungen" class="section"&gt;<text:line-break/>&lt;p class="eyebrow"&gt;Bewertungen&lt;/p&gt;<text:line-break/><text:soft-page-break/>&lt;h2&gt;Das sagen unsere Kundinnen und Kunden&lt;/h2&gt;</text:p>
      <text:p text:style-name="Standard"><text:span text:style-name="T1">&lt;div class="reviews"&gt;</text:span><text:line-break/><text:span text:style-name="T1">&lt;article&gt;</text:span><text:line-break/><text:span text:style-name="T1">&lt;span&gt;★★★★★&lt;/span&gt;</text:span><text:line-break/><text:span text:style-name="T1">&lt;p&gt;„Hervorragendes Preis-Leistungs-Niveau. Sehr professionelle und saubere Arbeit. Man fühlt sich sofort gut aufgehoben.“&lt;/p&gt;</text:span><text:line-break/><text:span text:style-name="T1">&lt;/article&gt;</text:span><text:line-break/><text:line-break/><text:span text:style-name="T1">&lt;article&gt;</text:span><text:line-break/><text:span text:style-name="T1">&lt;span&gt;★★★★★&lt;/span&gt;</text:span><text:line-break/><text:span text:style-name="T1">&lt;p&gt;„Jede Anwendung wird mit größter Sorgfalt ausgeführt. Man merkt sofort die Erfahrung und die Liebe zum Detail.“&lt;/p&gt;</text:span><text:line-break/><text:span text:style-name="T1">&lt;/article&gt;</text:span><text:line-break/><text:line-break/><text:span text:style-name="T1">&lt;article&gt;</text:span><text:line-break/><text:span text:style-name="T1">&lt;span&gt;★★★★★&lt;/span&gt;</text:span><text:line-break/><text:span text:style-name="T1">&lt;p&gt;„Sehr professionell, freundlich und zuverlässig. Absolute Empfehlung.“&lt;/p&gt;</text:span><text:line-break/><text:span text:style-name="T1">&lt;/article&gt;</text:span><text:line-break/><text:line-break/><text:span text:style-name="T1">&lt;article&gt;</text:span><text:line-break/><text:span text:style-name="T1">&lt;span&gt;★★★★★&lt;/span&gt;</text:span><text:line-break/><text:span text:style-name="T1">&lt;p&gt;„Ich komme immer wieder gerne. Die Ergebnisse sind jedes Mal hervorragend.“&lt;/p&gt;</text:span><text:line-break/><text:span text:style-name="T1">&lt;/article&gt;</text:span><text:line-break/><text:line-break/><text:span text:style-name="T1">&lt;article&gt;</text:span><text:line-break/><text:span text:style-name="T1">&lt;span&gt;★★★★★&lt;/span&gt;</text:span><text:line-break/><text:span text:style-name="T1">&lt;p&gt;„Sehr angenehme Atmosphäre und hochwertige Arbeit.“&lt;/p&gt;</text:span><text:line-break/><text:span text:style-name="T1">&lt;/article&gt;</text:span><text:line-break/><text:span text:style-name="T1">&lt;/div&gt;</text:span><text:line-break/><text:span text:style-name="T1">&lt;/section&gt;</text:span><text:line-break/><text:line-break/><text:span text:style-name="T1">&lt;section id="buchung" class="section booking"&gt;</text:span><text:line-break/><text:span text:style-name="T1">&lt;p class="eyebrow"&gt;Terminbuchung&lt;/p&gt;</text:span><text:line-break/><text:span text:style-name="T1">&lt;h2&gt;Termin online buchen&lt;/h2&gt;</text:span><text:line-break/><text:span text:style-name="T1">&lt;p&gt;Preise und verfügbare Termine finden Sie direkt im Online-Buchungssystem.&lt;/p&gt;</text:span><text:line-break/><text:line-break/><text:span text:style-name="T1">&lt;div id="bookingConsent" class="consent-box"&gt;</text:span><text:line-break/><text:span text:style-name="T1">&lt;p&gt;</text:span><text:line-break/><text:span text:style-name="T1">Mit dem Laden des Buchungssystems wird eine Verbindung zu Acuity Scheduling hergestellt.</text:span><text:line-break/><text:span text:style-name="T1">&lt;/p&gt;</text:span><text:line-break/><text:span text:style-name="T1">&lt;button class="glass-btn" id="loadBooking"&gt;Buchungssystem laden&lt;/button&gt;</text:span><text:line-break/><text:span text:style-name="T1">&lt;/div&gt;</text:span><text:line-break/><text:line-break/><text:span text:style-name="T1">&lt;div id="bookingFrame" class="booking-frame"&gt;&lt;/div&gt;</text:span><text:line-break/><text:span text:style-name="T1">&lt;/section&gt;</text:span><text:line-break/><text:line-break/><text:span text:style-name="T1">&lt;section class="section split contact"&gt;</text:span><text:line-break/><text:span text:style-name="T1">&lt;div&gt;</text:span><text:line-break/><text:span text:style-name="T1">&lt;p class="eyebrow"&gt;Kontakt&lt;/p&gt;</text:span><text:line-break/><text:soft-page-break/><text:span text:style-name="T1">&lt;h2&gt;Fußpflege Ana&lt;/h2&gt;</text:span><text:line-break/><text:line-break/><text:span text:style-name="T1">&lt;p&gt;</text:span><text:line-break/><text:span text:style-name="T1">Anastasija Sidorova&lt;br&gt;</text:span><text:line-break/><text:span text:style-name="T1">Hesseloherstraße 9&lt;br&gt;</text:span><text:line-break/><text:span text:style-name="T1">80802 München</text:span><text:line-break/><text:span text:style-name="T1">&lt;/p&gt;</text:span><text:line-break/><text:line-break/><text:span text:style-name="T1">&lt;p&gt;</text:span><text:line-break/><text:span text:style-name="T1">Telefon: &lt;a href="tel:+491732012080"&gt;+49 173 2012080&lt;/a&gt;&lt;br&gt;</text:span><text:line-break/><text:span text:style-name="T1">E-Mail: &lt;a href="mailto:fusspflegeana.matbor@gmail.com"&gt;fusspflegeana.matbor@gmail.com&lt;/a&gt;</text:span><text:line-break/><text:span text:style-name="T1">&lt;/p&gt;</text:span><text:line-break/><text:span text:style-name="T1">&lt;/div&gt;</text:span><text:line-break/><text:line-break/><text:span text:style-name="T1">&lt;div&gt;</text:span><text:line-break/><text:span text:style-name="T1">&lt;h3&gt;Öffnungszeiten&lt;/h3&gt;</text:span><text:line-break/><text:span text:style-name="T1">&lt;p&gt;</text:span><text:line-break/><text:span text:style-name="T1">Montag: 09:00–12:00 · 13:00–18:00&lt;br&gt;</text:span><text:line-break/><text:span text:style-name="T1">Dienstag: 09:00–15:00&lt;br&gt;</text:span><text:line-break/><text:span text:style-name="T1">Mittwoch: Geschlossen&lt;br&gt;</text:span><text:line-break/><text:span text:style-name="T1">Donnerstag: 09:00–12:00 · 13:00–18:00&lt;br&gt;</text:span><text:line-break/><text:span text:style-name="T1">Freitag: 09:00–12:00 · 13:00–18:00&lt;br&gt;</text:span><text:line-break/><text:span text:style-name="T1">Samstag: 09:00–15:00&lt;br&gt;</text:span><text:line-break/><text:span text:style-name="T1">Sonntag: Geschlossen</text:span><text:line-break/><text:span text:style-name="T1">&lt;/p&gt;</text:span><text:line-break/><text:span text:style-name="T1">&lt;/div&gt;</text:span><text:line-break/><text:span text:style-name="T1">&lt;/section&gt;</text:span><text:line-break/><text:line-break/><text:span text:style-name="T1">&lt;/main&gt;</text:span><text:line-break/><text:line-break/><text:span text:style-name="T1">&lt;footer&gt;</text:span><text:line-break/><text:span text:style-name="T1">&lt;p&gt;© 2026 Fußpflege Ana&lt;/p&gt;</text:span><text:line-break/><text:line-break/><text:span text:style-name="T1">&lt;div&gt;</text:span><text:line-break/><text:span text:style-name="T1">&lt;a href="impressum.html"&gt;Impressum&lt;/a&gt;</text:span><text:line-break/><text:span text:style-name="T1">&lt;a href="datenschutz.html"&gt;Datenschutzerklärung&lt;/a&gt;</text:span><text:line-break/><text:span text:style-name="T1">&lt;button id="openCookies"&gt;Cookie-Einstellungen&lt;/button&gt;</text:span><text:line-break/><text:span text:style-name="T1">&lt;/div&gt;</text:span><text:line-break/><text:span text:style-name="T1">&lt;/footer&gt;</text:span><text:line-break/><text:line-break/><text:span text:style-name="T1">&lt;div id="cookieBanner" class="cookie-banner"&gt;</text:span><text:line-break/><text:span text:style-name="T1">&lt;div class="cookie-box"&gt;</text:span><text:line-break/><text:span text:style-name="T1">&lt;h2&gt;Datenschutz-Einstellungen&lt;/h2&gt;</text:span><text:line-break/><text:line-break/><text:span text:style-name="T1">&lt;p&gt;</text:span><text:line-break/><text:span text:style-name="T1">Wir verwenden Cookies und ähnliche Technologien, um die Funktionalität der Website sicherzustellen,</text:span><text:line-break/><text:span text:style-name="T1">statistische Auswertungen durchzuführen und unsere Dienstleistungen zu verbessern.</text:span><text:line-break/><text:soft-page-break/><text:span text:style-name="T1">&lt;/p&gt;</text:span><text:line-break/><text:line-break/><text:span text:style-name="T1">&lt;label&gt;</text:span><text:line-break/><text:span text:style-name="T1">&lt;input type="checkbox" checked disabled&gt;</text:span><text:line-break/><text:span text:style-name="T1">Notwendige Cookies</text:span><text:line-break/><text:span text:style-name="T1">&lt;/label&gt;</text:span><text:line-break/><text:line-break/><text:span text:style-name="T1">&lt;label&gt;</text:span><text:line-break/><text:span text:style-name="T1">&lt;input type="checkbox" id="analyticsConsent"&gt;</text:span><text:line-break/><text:span text:style-name="T1">Statistik: Google Analytics</text:span><text:line-break/><text:span text:style-name="T1">&lt;/label&gt;</text:span><text:line-break/><text:line-break/><text:span text:style-name="T1">&lt;label&gt;</text:span><text:line-break/><text:span text:style-name="T1">&lt;input type="checkbox" id="clarityConsent"&gt;</text:span><text:line-break/><text:span text:style-name="T1">Nutzerverhalten: Microsoft Clarity</text:span><text:line-break/><text:span text:style-name="T1">&lt;/label&gt;</text:span><text:line-break/><text:line-break/><text:span text:style-name="T1">&lt;div class="cookie-actions"&gt;</text:span><text:line-break/><text:span text:style-name="T1">&lt;button id="rejectCookies"&gt;Ablehnen&lt;/button&gt;</text:span><text:line-break/><text:span text:style-name="T1">&lt;button id="saveCookies"&gt;Auswahl speichern&lt;/button&gt;</text:span><text:line-break/><text:span text:style-name="T1">&lt;button id="acceptCookies" class="glass-btn"&gt;Alle akzeptieren&lt;/button&gt;</text:span><text:line-break/><text:span text:style-name="T1">&lt;/div&gt;</text:span><text:line-break/><text:span text:style-name="T1">&lt;/div&gt;</text:span><text:line-break/><text:span text:style-name="T1">&lt;/div&gt;</text:span><text:line-break/><text:line-break/><text:span text:style-name="T1">&lt;script src="script.js"&gt;&lt;/script&gt;</text:span><text:line-break/><text:span text:style-name="T1">&lt;/body&gt;</text:span><text:line-break/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6-14T16:23:20.79</meta:creation-date>
    <meta:document-statistic meta:table-count="0" meta:image-count="0" meta:object-count="0" meta:page-count="6" meta:paragraph-count="2" meta:word-count="591" meta:character-count="6455"/>
    <dc:date>2026-06-14T16:25:49.71</dc:date>
    <meta:editing-duration>PT2M29S</meta:editing-duration>
    <meta:editing-cycles>1</meta:editing-cycles>
    <meta:generator>OpenOffice/4.1.16$Win32 OpenOffice.org_project/4116m3$Build-9816</meta:generator>
  </office:meta>
</office:document-meta>
</file>